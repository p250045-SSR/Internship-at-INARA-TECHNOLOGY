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P3" style:family="paragraph" style:parent-style-name="Standard">
      <style:paragraph-properties style:border-line-width-bottom="0.0035in 0.0035in 0.0035in" fo:padding-left="0in" fo:padding-right="0in" fo:padding-top="0in" fo:padding-bottom="0.028in" fo:border-left="none" fo:border-right="none" fo:border-top="none" fo:border-bottom="0.74pt double #000000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Title">
      <style:paragraph-properties fo:text-align="center" style:justify-single-word="false" fo:break-before="page"/>
    </style:style>
    <style:style style:name="T1" style:family="text">
      <style:text-properties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5"><text:span text:style-name="T1">Inara Technology</text:span></text:p>
      <text:p text:style-name="P6">Report: Module 1 &amp;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tab/><text:tab/><text:tab/><text:tab/><text:tab/><text:tab/><text:tab/><text:tab/><text:tab/>Submitted By:</text:p>
      <text:p text:style-name="P8"><text:tab/><text:tab/><text:tab/><text:tab/><text:tab/><text:tab/><text:tab/><text:tab/><text:tab/>Syed Shayan Rizvi</text:p>
      <text:p text:style-name="P1"><text:soft-page-break/>Module 1 (Basic_Training)</text:p>
      <text:h text:style-name="Heading_20_2" text:outline-level="2">Shell Basics</text:h>
      <text:p text:style-name="Standard">pwd — Show current directory</text:p>
      <text:p text:style-name="Standard">ls — List files/folders</text:p>
      <text:p text:style-name="Standard">cd — Change directory</text:p>
      <text:p text:style-name="Standard">echo — Print text/variables</text:p>
      <text:h text:style-name="Heading_20_2" text:outline-level="2">File System Hierarchy</text:h>
      <text:p text:style-name="Standard">find — Locate files</text:p>
      <text:p text:style-name="Standard">mkdir — Create directory</text:p>
      <text:p text:style-name="Standard">touch — Create file</text:p>
      <text:h text:style-name="Heading_20_2" text:outline-level="2">Permissions</text:h>
      <text:p text:style-name="Standard">chmod — Change permissions</text:p>
      <text:p text:style-name="Standard">chown — Change ownership</text:p>
      <text:h text:style-name="Heading_20_2" text:outline-level="2">Users, Groups and Sudo</text:h>
      <text:p text:style-name="Standard">useradd — Create user</text:p>
      <text:p text:style-name="Standard">groupadd — Create group</text:p>
      <text:p text:style-name="Standard">sudo — Run as administrator</text:p>
      <text:h text:style-name="Heading_20_2" text:outline-level="2">Text Processing</text:h>
      <text:p text:style-name="Standard">grep — Search text</text:p>
      <text:p text:style-name="Standard">sed — Edit text stream</text:p>
      <text:p text:style-name="Standard">awk — Process structured text</text:p>
      <text:p text:style-name="Standard"/>
      <text:p text:style-name="P9">Module 2</text:p>
      <text:h text:style-name="Heading_20_2" text:outline-level="2">Software &amp; Package Management</text:h>
      <text:p text:style-name="Standard">apt install — Install package</text:p>
      <text:p text:style-name="Standard">apt update — Update package list</text:p>
      <text:p text:style-name="Standard">dpkg -l — List packages</text:p>
      <text:h text:style-name="Heading_20_2" text:outline-level="2">Services &amp; Systemd</text:h>
      <text:p text:style-name="Standard">systemctl start — Start service</text:p>
      <text:p text:style-name="Standard">systemctl stop — Stop service</text:p>
      <text:p text:style-name="Standard">systemctl status — Check service status</text:p>
      <text:h text:style-name="Heading_20_2" text:outline-level="2">Process Management</text:h>
      <text:p text:style-name="Standard">ps aux — View processes</text:p>
      <text:p text:style-name="Standard">top — Monitor processes</text:p>
      <text:p text:style-name="Standard">kill — Terminate process</text:p>
      <text:h text:style-name="Heading_20_2" text:outline-level="2">Logs</text:h>
      <text:p text:style-name="Standard">journalctl — View logs</text:p>
      <text:p text:style-name="Standard">journalctl -f — Follow logs</text:p>
      <text:h text:style-name="Heading_20_2" text:outline-level="2">Cron &amp; Timers</text:h>
      <text:p text:style-name="Standard">crontab -e — Edit cron jobs</text:p>
      <text:p text:style-name="Standard">systemctl list-timers — List timers</text:p>
      <text:h text:style-name="Heading_20_2" text:outline-level="2">Storage</text:h>
      <text:p text:style-name="Standard">lsblk — Show disks</text:p>
      <text:p text:style-name="Standard">df -h — Disk usage</text:p>
      <text:p text:style-name="Standard">mount — Mount filesystem</text:p>
      <text:h text:style-name="Heading_20_2" text:outline-level="2">SSH</text:h>
      <text:p text:style-name="Standard">ssh — Remote login</text:p>
      <text:p text:style-name="Standard">ssh-keygen — Generate keys</text:p>
      <text:p text:style-name="Standard">scp — Copy files over SSH</text:p>
      <text:h text:style-name="Heading_20_2" text:outline-level="2"><text:soft-page-break/>Shell Scripting</text:h>
      <text:p text:style-name="Standard">chmod +x — Make script executable</text:p>
      <text:p text:style-name="Standard">bash script.sh — Run script</text:p>
      <text:h text:style-name="Heading_20_2" text:outline-level="2">Nginx</text:h>
      <text:p text:style-name="Standard">nginx -t — Test config</text:p>
      <text:p text:style-name="Standard">systemctl restart nginx — Restart Nginx</text:p>
      <text:h text:style-name="Heading_20_2" text:outline-level="2">RAID</text:h>
      <text:p text:style-name="Standard">mdadm — Manage RAID arrays</text:p>
      <text:h text:style-name="Heading_20_2" text:outline-level="2">Docker</text:h>
      <text:p text:style-name="Standard">docker pull — Download image</text:p>
      <text:p text:style-name="Standard">docker run — Run container</text:p>
      <text:p text:style-name="Standard">docker ps — List containers</text:p>
      <text:h text:style-name="Heading_20_2" text:outline-level="2">Kubernetes</text:h>
      <text:p text:style-name="Standard">kubectl get pods — List pods</text:p>
      <text:p text:style-name="Standard">kubectl apply -f — Apply manifest</text:p>
      <text:p text:style-name="Standard">kubectl get deployments — List deploy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Bullet_20_4" style:display-name="List Bullet 4" style:family="paragraph" style:parent-style-name="Standard" style:default-outline-level="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style:font-name="Courier" fo:font-family="Courier" style:font-family-generic="roman" style:font-pitch="variable" fo:font-size="10pt" fo:language="en" fo:country="US" style:letter-kerning="false" style:font-name-asian="ＭＳ 明朝" style:font-family-asian="'ＭＳ 明朝'" style:font-family-generic-asian="system" style:font-pitch-asian="variable" style:font-size-asian="10pt" style:language-asian="en" style:country-asian="US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23:15:00</meta:creation-date>
    <meta:initial-creator>python-docx</meta:initial-creator>
    <dc:description>generated by python-docx</dc:description>
    <dc:language>en-US</dc:language>
    <dc:date>2026-06-24T11:12:32.375000000</dc:date>
    <meta:editing-cycles>5</meta:editing-cycles>
    <meta:editing-duration>PT5M53S</meta:editing-duration>
    <meta:generator>Trio_Office/6.2.8.2$Windows_x86 LibreOffice_project/</meta:generator>
    <meta:document-statistic meta:table-count="0" meta:image-count="0" meta:object-count="0" meta:page-count="4" meta:paragraph-count="68" meta:word-count="221" meta:character-count="1505" meta:non-whitespace-character-count="12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